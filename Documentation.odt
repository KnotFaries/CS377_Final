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00000027B982594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officeooo:rsid="00204760" officeooo:paragraph-rsid="00204760"/>
    </style:style>
    <style:style style:name="P2" style:family="paragraph" style:parent-style-name="Standard">
      <style:text-properties officeooo:rsid="00204760" officeooo:paragraph-rsid="0024bc2b"/>
    </style:style>
    <style:style style:name="P3" style:family="paragraph" style:parent-style-name="Text_20_body">
      <style:text-properties officeooo:rsid="0024bc2b" officeooo:paragraph-rsid="0024bc2b"/>
    </style:style>
    <style:style style:name="P4" style:family="paragraph" style:parent-style-name="Standard">
      <style:text-properties officeooo:rsid="002134f3" officeooo:paragraph-rsid="002134f3"/>
    </style:style>
    <style:style style:name="P5" style:family="paragraph" style:parent-style-name="Standard">
      <style:text-properties officeooo:rsid="002323ef" officeooo:paragraph-rsid="002323ef"/>
    </style:style>
    <style:style style:name="P6" style:family="paragraph" style:parent-style-name="Standard">
      <style:text-properties officeooo:rsid="002323ef" officeooo:paragraph-rsid="0024bc2b"/>
    </style:style>
    <style:style style:name="P7" style:family="paragraph" style:parent-style-name="Text_20_body">
      <style:text-properties officeooo:paragraph-rsid="0024bc2b"/>
    </style:style>
    <style:style style:name="P8" style:family="paragraph" style:parent-style-name="Text_20_body">
      <style:text-properties officeooo:rsid="0026acf5" officeooo:paragraph-rsid="0026acf5"/>
    </style:style>
    <style:style style:name="P9" style:family="paragraph" style:parent-style-name="Heading_20_1">
      <style:text-properties officeooo:rsid="0024bc2b" officeooo:paragraph-rsid="0024bc2b"/>
    </style:style>
    <style:style style:name="P10" style:family="paragraph" style:parent-style-name="Heading_20_1">
      <style:text-properties officeooo:rsid="0026acf5" officeooo:paragraph-rsid="0026ac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ERD Digaram</text:h>
      <text:p text:style-name="P8"><draw:frame draw:style-name="fr1" draw:name="Image1" text:anchor-type="char" svg:width="6.9252in" svg:height="3.6161in" draw:z-index="0"><draw:image xlink:href="Pictures/10000001000004C00000027B9825949D.png" xlink:type="simple" xlink:show="embed" xlink:actuate="onLoad" draw:mime-type="image/png"/></draw:frame></text:p>
      <text:h text:style-name="Heading_20_1" text:outline-level="1">Tables: </text:h>
      <text:p text:style-name="P1">Contained in TableCreation.sql. </text:p>
      <text:p text:style-name="P1"/>
      <text:h text:style-name="Heading_20_2" text:outline-level="2">Author </text:h>
      <text:p text:style-name="P1">Author represents an individual author. Each row is a single person. This table contains author_id (INT Primary Key), user_name (varchar 100), fname (varchar 100) and lname(varchar 100). </text:p>
      <text:p text:style-name="P1"/>
      <text:h text:style-name="Heading_20_2" text:outline-level="2">Artist</text:h>
      <text:p text:style-name="P1">Artist represents an individual author. Each row is a single person. This table contains author_id (INT Primary Key), user_name (varchar 100), fname (varchar 100) and lname(varchar 100). </text:p>
      <text:p text:style-name="P1"/>
      <text:h text:style-name="Heading_20_2" text:outline-level="2">Tags</text:h>
      <text:p text:style-name="P1">Tag represents a ‘tag’ for a story, which describes a component or trope someone might be looking for or avoiding. This table has the coloms tag_id (INT Primary Key) and tag_name (varchar 100). </text:p>
      <text:p text:style-name="P1"/>
      <text:h text:style-name="Heading_20_2" text:outline-level="2"><text:soft-page-break/>Story</text:h>
      <text:p text:style-name="P2">Story represents a story. Each row is a single ‘story’. Series are denoted by ‘Vol’ in the title, and should have some part that is the same across all titles. It has the columns story_id INT PRIMARY KEY, title VARCHAR(100), alt_title VARCHAR(100), and source (text). Alt_title should be used if a story has an alternate title, often common for translated works, or older folk stories. Source describes what the story is in a sense of how one consumes the story. Novel, manga, fan fiction and concept albums are all examples for the source columns. </text:p>
      <text:p text:style-name="P1"/>
      <text:h text:style-name="Heading_20_2" text:outline-level="2">story_tag_composite</text:h>
      <text:p text:style-name="P4">This is a fully dependent table that works to connect the story table to the tag table. It contains the foreign keys story_id (INT) and tag_id (INT). </text:p>
      <text:p text:style-name="P1"/>
      <text:h text:style-name="Heading_20_2" text:outline-level="2">story_author_composite</text:h>
      <text:p text:style-name="P4">This is a fully dependent table that works to connect the story table to the tag table. It contains the foreign keys story_id (INT) and author_id (INT). </text:p>
      <text:p text:style-name="P1"/>
      <text:h text:style-name="Heading_20_2" text:outline-level="2">story_artist_composite</text:h>
      <text:p text:style-name="P4">This is a fully dependent table that works to connect the story table to the tag table. It contains the foreign keys story_id (INT) and artist_id (INT). </text:p>
      <text:p text:style-name="P1"/>
      <text:h text:style-name="Heading_20_1" text:outline-level="1">Views</text:h>
      <text:p text:style-name="P5">Contained in TestingView.sql</text:p>
      <text:p text:style-name="P5"/>
      <text:h text:style-name="Heading_20_2" text:outline-level="2">Title_AuthorName_Table</text:h>
      <text:p text:style-name="P5">Joins story, story_author_composite, and author into one table. This table contains the story_id, author_id, title, and author's username. If a story exist, it will show the author. </text:p>
      <text:p text:style-name="P5"/>
      <text:h text:style-name="Heading_20_2" text:outline-level="2">Title_Tag</text:h>
      <text:p text:style-name="P6">Joins story, story_tag_composite, and tags. This table contains title, tag_id, tag_name, and story_id. All titles and all tags are shown. </text:p>
      <text:p text:style-name="P5"/>
      <text:h text:style-name="Heading_20_1" text:outline-level="1">Procedures: </text:h>
      <text:p text:style-name="P5"/>
      <text:h text:style-name="Heading_20_2" text:outline-level="2"><text:soft-page-break/>NewStory_NewAuthor</text:h>
      <text:p text:style-name="P5">This procedure is for inserting a new author and new story at the same time. The ID numbers are not serial and so you must check what the next number should be. It adds values to the following tables: story, author, and story_author_composite. It takes the parameters story_id, title, source, author_id, user_name, fname, and lname. </text:p>
      <text:p text:style-name="P5"/>
      <text:h text:style-name="Heading_20_2" text:outline-level="2">NewStory</text:h>
      <text:p text:style-name="P5">This procedure is fro adding a new story, but there author is already in the database. The ID numbers are not serial and so you must check what the next number should be. It adds values to the tables story and story_author_composite. It takes the parameters: story_id, title, source, author_id. </text:p>
      <text:h text:style-name="Heading_20_2" text:outline-level="2"><text:line-break/>delete_story</text:h>
      <text:p text:style-name="P5">This procedures will take a story out of the database, however it dose not remove an author from the data base. It deletes information from story_author_composite and story. It takes the parameters story_id and author_id. </text:p>
      <text:p text:style-name="P5"/>
      <text:p text:style-name="P5"/>
      <text:h text:style-name="Heading_20_2" text:outline-level="2">tag_to_story</text:h>
      <text:p text:style-name="P5">This procedure adds values s to story_tag_composite. It takes the parameters of story_id and tag_id. </text:p>
      <text:p text:style-name="P5"/>
      <text:h text:style-name="P9" text:outline-level="1">Query Examples:</text:h>
      <text:p text:style-name="P3">Containted in QueryExamples.sql</text:p>
      <text:p text:style-name="P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04T11:07:50.402000000</meta:creation-date>
    <meta:generator>LibreOffice/7.6.7.2$Windows_X86_64 LibreOffice_project/dd47e4b30cb7dab30588d6c79c651f218165e3c5</meta:generator>
    <dc:date>2026-05-07T21:07:07.634000000</dc:date>
    <meta:editing-duration>PT13H59M13S</meta:editing-duration>
    <meta:editing-cycles>5</meta:editing-cycles>
    <meta:document-statistic meta:table-count="0" meta:image-count="1" meta:object-count="0" meta:page-count="3" meta:paragraph-count="34" meta:word-count="493" meta:character-count="3153" meta:non-whitespace-character-count="2676"/>
  </office:meta>
</office:document-meta>
</file>